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f0727"/>
    </style:style>
    <style:style style:name="T2" style:family="text">
      <style:text-properties officeooo:rsid="00204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tions Légales</text:p>
      <text:p text:style-name="P1"/>
      <text:p text:style-name="P1"/>
      <text:p text:style-name="Standard">1. Éditeur du site </text:p>
      <text:p text:style-name="Standard">Le site www.<text:span text:style-name="T2">101poils</text:span>.com est édité par :</text:p>
      <text:p text:style-name="Standard">Nom de l'entreprise : <text:span text:style-name="T2">101 POILS</text:span></text:p>
      <text:p text:style-name="Standard">Siège social : <text:span text:style-name="T1">1</text:span><text:span text:style-name="T2">19 ROUTE DE POUSSIGNAC</text:span>, 47250 <text:span text:style-name="T2">ARGENT</text:span>ON, France</text:p>
      <text:p text:style-name="Standard">Numéro SIRET : 82254894700024 </text:p>
      <text:p text:style-name="Standard">Responsable de publication : <text:span text:style-name="T2">SYLVIE POCHET</text:span></text:p>
      <text:p text:style-name="Standard">Email : sylvie.dupontpochet@gmail.com</text:p>
      <text:p text:style-name="Standard">Téléphone : 06 12 39 90 15</text:p>
      <text:p text:style-name="Standard"/>
      <text:p text:style-name="Standard">2. Hébergeur du site </text:p>
      <text:p text:style-name="Standard">Le site est hébergé par : A venir</text:p>
      <text:p text:style-name="Standard">Adresses et informations disponibles sur www.site.com.</text:p>
      <text:p text:style-name="Standard"/>
      <text:p text:style-name="Standard">3. Conception et gestion du site </text:p>
      <text:p text:style-name="Standard">Le site a été conçu, mis en ligne et est maintenu par François Vauchot</text:p>
      <text:p text:style-name="Standard">Adresse : 148 route de Figuès 47250 Argenton France</text:p>
      <text:p text:style-name="Standard">Email : francois.<text:a xlink:type="simple" xlink:href="mailto:vauchot@gmail.com" text:style-name="Internet_20_link" text:visited-style-name="Visited_20_Internet_20_Link">vauchot</text:a><text:a xlink:type="simple" xlink:href="mailto:vauchot@gmail.com" text:style-name="Internet_20_link" text:visited-style-name="Visited_20_Internet_20_Link">@gmail.com</text:a></text:p>
      <text:p text:style-name="Standard"/>
      <text:p text:style-name="Standard">4. Propriété intellectuelle </text:p>
      <text:p text:style-name="Standard">Tous les contenus présents sur le site (textes, images, logos, etc.) sont la propriété exclusive de <text:span text:style-name="T2">101 POILS</text:span>, sauf mentions contraires. Toute reproduction, même partielle, sans autorisation est interdite.</text:p>
      <text:p text:style-name="Standard"/>
      <text:p text:style-name="Standard">5. Responsabilités </text:p>
      <text:p text:style-name="Standard">L'éditeur du site s'efforce de fournir des informations exactes et mises à jour, mais ne saurait être tenu responsable en cas d'erreurs ou d'omissions.</text:p>
      <text:p text:style-name="Standard"/>
      <text:p text:style-name="Standard">6. Liens hypertextes </text:p>
      <text:p text:style-name="Standard">Le site contient des liens hypertextes permettant d'accéder aux réseaux sociaux Facebook, Instagram et LinkedIn, ainsi que des boutons permettant d'appeler directement ou d'envoyer un email à <text:span text:style-name="T2">101 POILS</text:span>. <text:span text:style-name="T1">L’entreprise</text:span> n'est pas responsable du contenu des sites externes liés.</text:p>
      <text:p text:style-name="Standard"/>
      <text:p text:style-name="Standard">7. Droit applicable </text:p>
      <text:p text:style-name="Standard">Les présentes mentions légales sont soumises au droit frança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true" fo:line-height="100%" fo:text-align="start" style:justify-single-word="false" fo:orphans="2" fo:widows="2" style:register-true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17T20:21:26.555000000</dc:date>
    <meta:editing-duration>PT1H35M5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211" meta:character-count="1379" meta:non-whitespace-character-count="1184"/>
  </office:meta>
</office:document-meta>
</file>