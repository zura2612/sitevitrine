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2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Georgia_1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Liberation_Sans_1.ttf" manifest:media-type="application/x-font-ttf"/>
  <manifest:file-entry manifest:full-path="Fonts/Font_Georgia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.03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normal">
      <loext:graphic-properties draw:fill="none" draw:fill-color="#ffffff"/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normal">
      <loext:graphic-properties draw:fill="none" draw:fill-color="#ffffff"/>
      <style:paragraph-properties fo:margin-left="0.00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normal">
      <loext:graphic-properties draw:fill="none" draw:fill-color="#ffffff"/>
      <style:paragraph-properties fo:margin-left="0.007cm" fo:margin-right="-0.009cm" fo:margin-top="0cm" fo:margin-bottom="0cm" style:contextual-spacing="false" fo:line-height="100%" fo:text-align="justify" style:justify-single-word="false" fo:keep-together="auto" fo:orphans="0" fo:widows="0" fo:text-indent="0.016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normal">
      <loext:graphic-properties draw:fill="none" draw:fill-color="#ffffff"/>
      <style:paragraph-properties fo:margin-left="0.007cm" fo:margin-right="-0.009cm" fo:margin-top="0cm" fo:margin-bottom="0cm" style:contextual-spacing="false" fo:line-height="100%" fo:text-align="justify" style:justify-single-word="false" fo:orphans="0" fo:widows="0" fo:text-indent="0.016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normal">
      <loext:graphic-properties draw:fill="none" draw:fill-color="#ffffff"/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normal">
      <loext:graphic-properties draw:fill="none" draw:fill-color="#ffffff"/>
      <style:paragraph-properties fo:margin-left="0cm" fo:margin-right="2.522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2" style:family="paragraph" style:parent-style-name="normal">
      <loext:graphic-properties draw:fill="none" draw:fill-color="#ffffff"/>
      <style:paragraph-properties fo:margin-left="0.02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242a0f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normal" style:master-page-name="Standard">
      <loext:graphic-properties draw:fill="none" draw:fill-color="#ffffff"/>
      <style:paragraph-properties fo:margin-left="0cm" fo:margin-right="2.522cm" fo:margin-top="0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" style:family="text">
      <style:text-properties officeooo:rsid="001d9423"/>
    </style:style>
    <style:style style:name="T2" style:family="text">
      <style:text-properties officeooo:rsid="001de152"/>
    </style:style>
    <style:style style:name="T3" style:family="text">
      <style:text-properties officeooo:rsid="00223f78"/>
    </style:style>
    <style:style style:name="T4" style:family="text">
      <style:text-properties officeooo:rsid="0025d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olitique de Confidentialité </text:p>
      <text:p text:style-name="P11"/>
      <text:p text:style-name="Standard"/>
      <text:p text:style-name="P1">1. Données collectées </text:p>
      <text:p text:style-name="P2">Le site <text:span text:style-name="T2">www.</text:span><text:span text:style-name="T3">101poils</text:span><text:span text:style-name="T1">.com</text:span> ne collecte aucune donnée personnelle. </text:p>
      <text:p text:style-name="P3"/>
      <text:p text:style-name="P4">2. Utilisation des données </text:p>
      <text:p text:style-name="P5">Aucune donnée personnelle n'est collectée ni traitée par <text:span text:style-name="T4">SANS UN POIL</text:span>. </text:p>
      <text:p text:style-name="P6"/>
      <text:p text:style-name="P7">3. Partage des données </text:p>
      <text:p text:style-name="P2">Les données ne sont pas vendues ni cédées à des tiers, car aucune collecte n'est effectuée. </text:p>
      <text:p text:style-name="P3"/>
      <text:p text:style-name="P4">4. Cookies </text:p>
      <text:p text:style-name="P8">Le site n'utilise pas de cookies à des fins publicitaires ou analytiques. Il contient uniquement des liens hypertextes redirigeant vers les réseaux sociaux Facebook, Instagram et LinkedIn, ainsi que des boutons d'appel et d'envoi d'email. </text:p>
      <text:p text:style-name="P9"/>
      <text:p text:style-name="P10">5. Contact </text:p>
      <text:p text:style-name="P12">Pour toute question sur la politique de confidentialité, contactez-nous à sylvie.<text:span text:style-name="T4">tartempion</text:span>@gmail.c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04cm" fo:margin-bottom="2.182cm" fo:margin-left="1.104cm" fo:margin-right="1.099cm" style:writing-mode="lr-tb" style:layout-grid-color="#c0c0c0" style:layout-grid-lines="263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7-01T15:45:47.319000000</dc:date>
    <meta:editing-duration>PT6H2M8S</meta:editing-duration>
    <meta:editing-cycles>9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1" meta:word-count="99" meta:character-count="691" meta:non-whitespace-character-count="593"/>
  </office:meta>
</office:document-meta>
</file>