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>
        <style:tab-stops>
          <style:tab-stop style:position="3.26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3.263cm"/>
        </style:tab-stops>
      </style:paragraph-properties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0994b8"/>
    </style:style>
    <style:style style:name="T1" style:family="text">
      <style:text-properties officeooo:rsid="00070894"/>
    </style:style>
    <style:style style:name="T2" style:family="text">
      <style:text-properties officeooo:rsid="0008c916"/>
    </style:style>
    <style:style style:name="T3" style:family="text">
      <style:text-properties officeooo:rsid="000994b8"/>
    </style:style>
    <style:style style:name="T4" style:family="text">
      <style:text-properties officeooo:rsid="001f0727"/>
    </style:style>
    <style:style style:name="T5" style:family="text">
      <style:text-properties officeooo:rsid="00204b28"/>
    </style:style>
    <style:style style:name="T6" style:family="text">
      <style:text-properties officeooo:rsid="000a2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gal</text:span> N<text:span text:style-name="T1">otice</text:span></text:p>
      <text:p text:style-name="P2"/>
      <text:p text:style-name="P2"/>
      <text:p text:style-name="P3">1. Website Publisher</text:p>
      <text:p text:style-name="P3">The website www.<text:span text:style-name="T6">101poils</text:span>.com is published by:</text:p>
      <text:p text:style-name="P3">• Company Name: <text:span text:style-name="T3">101 POILS</text:span></text:p>
      <text:p text:style-name="P4">• Registered Office: <text:span text:style-name="T4">1</text:span><text:span text:style-name="T5">19 ROUTE DE POUSSIGNAC</text:span>, 47250 <text:span text:style-name="T5">ARGENT</text:span>ON, France</text:p>
      <text:p text:style-name="P4">• SIRET Number: <text:s/>82254894700024</text:p>
      <text:p text:style-name="P4">• Publication Director: <text:span text:style-name="T5">SYLVIE POCHET</text:span></text:p>
      <text:p text:style-name="P4">• Email: sylvie.dupontpochet@gmail.com</text:p>
      <text:p text:style-name="P4">• Phone: 06 12 39 90 15</text:p>
      <text:p text:style-name="P3"/>
      <text:p text:style-name="P3">2. Website Host</text:p>
      <text:p text:style-name="P3">The website is hosted by: To be determined</text:p>
      <text:p text:style-name="P3">Address and technical details will be provided at www.site.com.</text:p>
      <text:p text:style-name="P3"/>
      <text:p text:style-name="P3">3. Website Design &amp; Management</text:p>
      <text:p text:style-name="P3">The website was designed, launched, and is maintained by François Vauchot</text:p>
      <text:p text:style-name="P3">• Address: 148 Route de Figuès, 47250 Argenton, France</text:p>
      <text:p text:style-name="P3">• Email: francois.vauchot@gmail.com</text:p>
      <text:p text:style-name="P3"/>
      <text:p text:style-name="P3">4. Intellectual Property</text:p>
      <text:p text:style-name="P3">All content present on the website (texts, images, logos, etc.) is the exclusive property of F<text:span text:style-name="T2">V</text:span> ELEC 47, unless otherwise stated. Any reproduction, even partial, without prior authorization is strictly prohibited.</text:p>
      <text:p text:style-name="P3"/>
      <text:p text:style-name="P3">5. Liability</text:p>
      <text:p text:style-name="P3">The publisher strives to provide accurate and up-to-date information but cannot be held liable for any errors or omissions.</text:p>
      <text:p text:style-name="P3"/>
      <text:p text:style-name="P3">6. Hyperlinks</text:p>
      <text:p text:style-name="P3">The website contains hyperlinks to social media platforms (Facebook, Instagram, and LinkedIn), as well as buttons allowing direct calls or emails to <text:span text:style-name="T2">FV</text:span> ELEC 47. <text:span text:style-name="T2">The company</text:span> is not responsible for the content of external linked websites.</text:p>
      <text:p text:style-name="P3"/>
      <text:p text:style-name="P3">7. Governing Law</text:p>
      <text:p text:style-name="P3">These legal notices are governed by French la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17T20:24:52.292000000</dc:date>
    <meta:editing-duration>PT7M54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198" meta:character-count="1295" meta:non-whitespace-character-count="1120"/>
  </office:meta>
</office:document-meta>
</file>