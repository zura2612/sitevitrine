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0994b8"/>
    </style:style>
    <style:style style:name="P5" style:family="paragraph" style:parent-style-name="Standard">
      <style:text-properties style:font-name="Arial" officeooo:paragraph-rsid="000adcde"/>
    </style:style>
    <style:style style:name="T1" style:family="text">
      <style:text-properties officeooo:rsid="00070894"/>
    </style:style>
    <style:style style:name="T2" style:family="text">
      <style:text-properties officeooo:rsid="0008c916"/>
    </style:style>
    <style:style style:name="T3" style:family="text">
      <style:text-properties officeooo:rsid="000994b8"/>
    </style:style>
    <style:style style:name="T4" style:family="text">
      <style:text-properties officeooo:rsid="001f0727"/>
    </style:style>
    <style:style style:name="T5" style:family="text">
      <style:text-properties officeooo:rsid="00204b28"/>
    </style:style>
    <style:style style:name="T6" style:family="text">
      <style:text-properties officeooo:rsid="000a2345"/>
    </style:style>
    <style:style style:name="T7" style:family="text">
      <style:text-properties officeooo:rsid="000ad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gal</text:span> N<text:span text:style-name="T1">otice</text:span></text:p>
      <text:p text:style-name="P2"/>
      <text:p text:style-name="P2"/>
      <text:p text:style-name="P3">1. Website Publisher</text:p>
      <text:p text:style-name="P3">The website www.<text:span text:style-name="T6">101poils</text:span>.com is published by:</text:p>
      <text:p text:style-name="P3">• Company Name: <text:span text:style-name="T7">SANS UN POIL</text:span></text:p>
      <text:p text:style-name="P4">• Registered Office: <text:span text:style-name="T7">300</text:span><text:span text:style-name="T5"> ROUTE DE POUSSIGNAC</text:span>, 47250 <text:span text:style-name="T5">ARGENT</text:span>ON, France</text:p>
      <text:p text:style-name="P4">• SIRET Number: <text:s/>822548947000<text:span text:style-name="T7">00</text:span></text:p>
      <text:p text:style-name="P4">• Publication Director: <text:span text:style-name="T5">SYLVIE </text:span><text:span text:style-name="T7">TARTEMPION</text:span></text:p>
      <text:p text:style-name="P4">• Email: sylvie.<text:span text:style-name="T7">tartempion</text:span>@gmail.com</text:p>
      <text:p text:style-name="P4">• Phone: 06 12 39 <text:span text:style-name="T7">12 34</text:span></text:p>
      <text:p text:style-name="P3"/>
      <text:p text:style-name="P3">2. Website Host</text:p>
      <text:p text:style-name="P3">The website is hosted by: To be determined</text:p>
      <text:p text:style-name="P3">Address and technical details will be provided at www.site.com.</text:p>
      <text:p text:style-name="P3"/>
      <text:p text:style-name="P3">3. Website Design &amp; Management</text:p>
      <text:p text:style-name="P3">The website was designed, launched, and is maintained by François Vauchot</text:p>
      <text:p text:style-name="P3">• Address: 148 Route de Figuès, 47250 Argenton, France</text:p>
      <text:p text:style-name="P3">• Email: francois.vauchot@gmail.com</text:p>
      <text:p text:style-name="P3"/>
      <text:p text:style-name="P3">4. Intellectual Property</text:p>
      <text:p text:style-name="P5">All content present on the website (texts, images, logos, etc.) is the exclusive property of <text:span text:style-name="T7">SANS UN POIL</text:span>, unless otherwise stated. Any reproduction, even partial, without prior authorization is strictly prohibited.</text:p>
      <text:p text:style-name="P3"/>
      <text:p text:style-name="P3">5. Liability</text:p>
      <text:p text:style-name="P3">The publisher strives to provide accurate and up-to-date information but cannot be held liable for any errors or omissions.</text:p>
      <text:p text:style-name="P3"/>
      <text:p text:style-name="P3">6. Hyperlinks</text:p>
      <text:p text:style-name="P5">The website contains hyperlinks to social media platforms (Facebook, Instagram, and LinkedIn), as well as buttons allowing direct calls or emails to <text:span text:style-name="T7">SANS UN POIL</text:span>. <text:span text:style-name="T2">The company</text:span> is not responsible for the content of external linked websites.</text:p>
      <text:p text:style-name="P3"/>
      <text:p text:style-name="P3">7. Governing Law</text:p>
      <text:p text:style-name="P3">These legal notices are governed by French la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7-01T15:44:13.826000000</dc:date>
    <meta:editing-duration>PT10M3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199" meta:character-count="1304" meta:non-whitespace-character-count="1128"/>
  </office:meta>
</office:document-meta>
</file>